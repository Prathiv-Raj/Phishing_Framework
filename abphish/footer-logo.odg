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FC100001AC50000039E94162B1E.svg" manifest:media-type="image/svg+xml"/>
  <manifest:file-entry manifest:full-path="Pictures/100000010000010300000023D92CA8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5.55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95cm" svg:height="0.925cm" svg:x="5.557cm" svg:y="0cm">
          <draw:image xlink:href="Pictures/10001FC100001AC50000039E94162B1E.svg" xlink:type="simple" xlink:show="embed" xlink:actuate="onLoad" draw:mime-type="image/svg+xml">
            <text:p/>
          </draw:image>
          <draw:image xlink:href="Pictures/100000010000010300000023D92CA83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6cm" fo:margin-bottom="0.16cm" fo:margin-left="0.16cm" fo:margin-right="0.16cm" fo:page-width="6.853cm" fo:page-height="0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7-01T15:30:06.450120000</dc:date>
    <meta:editing-duration>PT2M26S</meta:editing-duration>
    <meta:editing-cycles>1</meta:editing-cycles>
    <meta:document-statistic meta:object-count="1"/>
    <meta:generator>LibreOffice/25.2.5.2$Windows_X86_64 LibreOffice_project/03d19516eb2e1dd5d4ccd751a0d6f35f35e08022</meta:generator>
  </office:meta>
</office:document-meta>
</file>